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A0000023C61C143BB.png" manifest:media-type="image/png"/>
  <manifest:file-entry manifest:full-path="Pictures/100000010000026100000190B031B874.png" manifest:media-type="image/png"/>
  <manifest:file-entry manifest:full-path="Pictures/1000000100000456000001C682BB0E36.png" manifest:media-type="image/png"/>
  <manifest:file-entry manifest:full-path="Pictures/10000001000003D400000351581C78FE.png" manifest:media-type="image/png"/>
  <manifest:file-entry manifest:full-path="Pictures/10000001000004B200000135029073D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color="#2497e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adrão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Padrão-title">
      <style:graphic-properties draw:fill="solid" draw:fill-color="#2497ee" draw:textarea-horizontal-align="left" fo:min-height="3.257cm" loext:decorative="false"/>
      <style:paragraph-properties style:writing-mode="lr-tb"/>
    </style:style>
    <style:style style:name="pr3" style:family="presentation" style:parent-style-name="Padrão-outline1">
      <style:graphic-properties draw:textarea-horizontal-align="justify"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left"/>
    </style:style>
    <style:style style:name="P4" style:family="paragraph">
      <loext:graphic-properties draw:fill="solid" draw:fill-color="#2497ee"/>
      <style:paragraph-properties fo:text-align="left"/>
      <style:text-properties style:font-name="Comfortaa"/>
    </style:style>
    <style:style style:name="P5" style:family="paragraph">
      <style:paragraph-properties fo:margin-top="0.42cm" fo:margin-bottom="0.35cm" fo:text-align="justify"/>
    </style:style>
    <style:style style:name="P6" style:family="paragraph">
      <style:paragraph-properties fo:text-align="justify"/>
      <style:text-properties style:font-name="Comfortaa"/>
    </style:style>
    <style:style style:name="P7" style:family="paragraph">
      <style:paragraph-properties fo:text-align="justify"/>
    </style:style>
    <style:style style:name="P8" style:family="paragraph">
      <style:paragraph-properties fo:text-align="center"/>
    </style:style>
    <style:style style:name="T1" style:family="text">
      <style:text-properties style:font-name="Comfortaa"/>
    </style:style>
    <style:style style:name="T2" style:family="text">
      <style:text-properties style:font-name="Comfortaa" fo:font-size="20pt" style:font-size-asian="20pt" style:font-size-complex="20pt"/>
    </style:style>
    <style:style style:name="T3" style:family="text">
      <style:text-properties style:font-name="Comfortaa" fo:font-size="20pt" fo:background-color="#2497ee" style:font-size-asian="20pt" style:font-size-complex="20pt"/>
    </style:style>
    <style:style style:name="T4" style:family="text">
      <style:text-properties style:font-name="Comfortaa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Comfortaa"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mfortaa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omfortaa" fo:font-size="18pt" style:font-size-asian="18pt" style:font-size-complex="18pt"/>
    </style:style>
    <style:style style:name="T8" style:family="text">
      <style:text-properties style:font-name="Comfortaa" fo:font-size="18pt" fo:font-style="italic" style:font-size-asian="18pt" style:font-style-asian="italic" style:font-size-complex="18pt" style:font-style-complex="italic"/>
    </style:style>
    <style:style style:name="T9" style:family="text">
      <style:text-properties style:font-name="Comfortaa" fo:font-size="20pt" fo:background-color="transparent" style:font-size-asian="20pt" style:font-size-complex="20pt"/>
    </style:style>
    <style:style style:name="T10" style:family="text">
      <style:text-properties style:font-name="Comfortaa" fo:font-size="20pt" fo:font-weight="bold" fo:background-color="transparent" style:font-size-asian="20pt" style:font-weight-asian="bold" style:font-size-complex="20pt" style:font-weight-complex="bold"/>
    </style:style>
    <style:style style:name="T11" style:family="text">
      <style:text-properties style:font-name="Comfortaa" fo:font-size="18pt" fo:background-color="transparent" style:font-size-asian="18pt" style:font-size-complex="18pt"/>
    </style:style>
    <style:style style:name="T12" style:family="text">
      <style:text-properties fo:color="#2497ee" loext:opacity="100%" style:font-name="Comfortaa" fo:font-size="20pt" style:text-underline-style="solid" style:text-underline-width="auto" style:text-underline-color="font-color" fo:background-color="transparent" style:font-size-asian="20pt" style:font-size-complex="20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omfortaa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497ee" loext:opacity="100%" style:text-outline="false" style:text-line-through-style="none" style:text-line-through-type="none" style:font-name="Comfortaa" fo:font-size="20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omfortaa" fo:font-size="20pt" fo:font-weight="bold" fo:background-color="#2497ee" style:font-size-asian="20pt" style:font-weight-asian="bold" style:font-size-complex="20pt" style:font-weight-complex="bold"/>
    </style:style>
    <style:style style:name="T16" style:family="text">
      <style:text-properties style:font-name="Comfortaa" fo:font-size="20pt" fo:font-weight="normal" style:font-size-asian="20pt" style:font-weight-asian="normal" style:font-size-complex="20pt" style:font-weight-complex="normal"/>
    </style:style>
    <style:style style:name="T17" style:family="text">
      <style:text-properties style:font-name="Comfortaa" fo:font-size="20pt" fo:font-weight="normal" fo:background-color="#2497ee" style:font-size-asian="20pt" style:font-weight-asian="normal" style:font-size-complex="20pt" style:font-weight-complex="normal"/>
    </style:style>
    <style:style style:name="T18" style:family="text">
      <style:text-properties fo:font-variant="normal" fo:text-transform="none" fo:color="#2497ee" loext:opacity="100%" style:text-outline="false" style:text-line-through-style="none" style:text-line-through-type="none" style:font-name="Comfortaa" fo:font-size="18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omfortaa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font-name="Comfortaa" fo:font-size="20pt" style:text-underline-style="none" fo:background-color="transparent" style:font-size-asian="20pt" style:font-size-complex="20pt"/>
    </style:style>
    <style:style style:name="T21" style:family="text">
      <style:text-properties style:font-name="Comfortaa" fo:font-size="20pt" fo:font-style="italic" fo:background-color="transparent" style:font-size-asian="20pt" style:font-style-asian="italic" style:font-size-complex="20pt" style:font-style-complex="italic"/>
    </style:style>
    <style:style style:name="T22" style:family="text">
      <style:text-properties style:font-name="Comfortaa" fo:font-size="20pt" fo:font-style="normal" fo:background-color="transparent" style:font-size-asian="20pt" style:font-style-asian="normal" style:font-size-complex="20pt" style:font-style-complex="normal"/>
    </style:style>
    <style:style style:name="T23" style:family="text">
      <style:text-properties style:font-name="Comfortaa" fo:font-size="20pt" fo:font-style="normal" fo:background-color="#2497ee" style:font-size-asian="20pt" style:font-style-asian="normal" style:font-size-complex="20pt" style:font-style-complex="normal"/>
    </style:style>
    <style:style style:name="T24" style:family="text">
      <style:text-properties style:font-name="Comfortaa" fo:font-size="18pt" fo:font-style="normal" fo:background-color="transparent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7.999cm" svg:height="7.197cm" svg:x="0cm" svg:y="4cm">
          <draw:image xlink:href="Pictures/10000001000004B200000135029073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2" draw:text-style-name="P4" draw:layer="layout" svg:width="28cm" svg:height="3.257cm" svg:x="0cm" svg:y="0cm" presentation:class="title" presentation:user-transformed="true">
          <draw:text-box>
            <text:p text:style-name="P3"><text:span text:style-name="T1"><text:s/>O que é o Docker</text:span></text:p>
          </draw:text-box>
        </draw:frame>
        <draw:frame presentation:style-name="pr3" draw:text-style-name="P6" draw:layer="layout" svg:width="27cm" svg:height="12cm" svg:x="0.5cm" svg:y="3.5cm" presentation:class="outline" presentation:user-transformed="true">
          <draw:text-box>
            <text:list text:style-name="L2">
              <text:list-item>
                <text:p text:style-name="P5"><text:span text:style-name="T2">O </text:span><text:span text:style-name="T3">Docker</text:span><text:span text:style-name="T2"> é uma plataforma aberta para </text:span><text:span text:style-name="T4">desenvolver</text:span><text:span text:style-name="T2">, </text:span><text:span text:style-name="T4">distribuir</text:span><text:span text:style-name="T2"> e </text:span><text:span text:style-name="T4">executar</text:span><text:span text:style-name="T2"> aplicações. </text:span></text:p>
              </text:list-item>
              <text:list-item>
                <text:p text:style-name="P5"><text:span text:style-name="T2">Ele permite </text:span><text:span text:style-name="T4">separar</text:span><text:span text:style-name="T2"> as aplicações da infraestrutura, possibilitando a entrega rápida de software.</text:span></text:p>
              </text:list-item>
              <text:list-item>
                <text:p text:style-name="P5"><text:span text:style-name="T2">Ele permite também empacotar e executar uma aplicação em um ambiente </text:span><text:span text:style-name="T4">parcialmente isolado</text:span><text:span text:style-name="T2">, chamado </text:span><text:span text:style-name="T3">contêiner</text:span><text:span text:style-name="T2">. O isolamento e a segurança permitem executar vários </text:span><text:span text:style-name="T3">contêineres</text:span><text:span text:style-name="T2"> simultaneamente em um mesmo </text:span><text:span text:style-name="T5">host</text:span><text:span text:style-name="T2">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2" draw:text-style-name="P4" draw:layer="layout" svg:width="28cm" svg:height="3.257cm" svg:x="0cm" svg:y="0cm" presentation:class="title" presentation:user-transformed="true">
          <draw:text-box>
            <text:p text:style-name="P3"><text:span text:style-name="T6"><text:s/></text:span><text:span text:style-name="T1">O que é Contêiner</text:span></text:p>
          </draw:text-box>
        </draw:frame>
        <draw:frame presentation:style-name="pr3" draw:text-style-name="P6" draw:layer="layout" svg:width="27cm" svg:height="3.5cm" svg:x="0.5cm" svg:y="3.5cm" presentation:class="outline" presentation:user-transformed="true">
          <draw:text-box>
            <text:list text:style-name="L2">
              <text:list-item>
                <text:p text:style-name="P5"><text:span text:style-name="T2">Um </text:span><text:span text:style-name="T3">contêiner</text:span><text:span text:style-name="T2"> é uma unidade padrão de software que </text:span><text:span text:style-name="T4">empacota</text:span><text:span text:style-name="T2"> o código e todas as suas dependências, permitindo que o aplicativo seja executado de forma rápida e confiável em </text:span><text:span text:style-name="T4">diferentes ambientes computacionais</text:span><text:span text:style-name="T2">. </text:span></text:p>
              </text:list-item>
            </text:list>
            <text:p text:style-name="P5"><text:span text:style-name="T2"/></text:p>
          </draw:text-box>
        </draw:frame>
        <draw:frame draw:style-name="gr3" draw:text-style-name="P1" draw:layer="layout" svg:width="13.5cm" svg:height="11.695cm" svg:x="-1.2cm" svg:y="5.205cm">
          <draw:image xlink:href="Pictures/10000001000003D400000351581C78FE.png" xlink:type="simple" xlink:show="embed" xlink:actuate="onLoad" draw:mime-type="image/png">
            <text:p/>
          </draw:image>
        </draw:frame>
        <draw:frame presentation:style-name="pr3" draw:text-style-name="P6" draw:layer="layout" svg:width="16cm" svg:height="8.5cm" svg:x="11.5cm" svg:y="7cm" presentation:class="outline" presentation:user-transformed="true">
          <draw:text-box>
            <text:list text:style-name="L2">
              <text:list-item>
                <text:p text:style-name="P5"><text:span text:style-name="T2">Em outras palavras, </text:span><text:span text:style-name="T3">contêineres</text:span><text:span text:style-name="T2"> são </text:span><text:span text:style-name="T4">processos isolados para cada componente</text:span><text:span text:style-name="T2"> de uma aplicação. </text:span></text:p>
              </text:list-item>
              <text:list-item>
                <text:p text:style-name="P5"><text:span text:style-name="T2">Cada componente é executado em seu próprio ambiente isolado, e completamente isolado do restante de sua máquina.</text:span></text:p>
                <text:list>
                  <text:list-item>
                    <text:p text:style-name="P7"><text:span text:style-name="T7">Aplicação </text:span><text:span text:style-name="T8">front-end</text:span><text:span text:style-name="T7"> com React;</text:span></text:p>
                  </text:list-item>
                  <text:list-item>
                    <text:p text:style-name="P7"><text:span text:style-name="T8">Back-end</text:span><text:span text:style-name="T7"> API com Python;</text:span></text:p>
                  </text:list-item>
                  <text:list-item>
                    <text:p text:style-name="P7"><text:span text:style-name="T7">Banco de dad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2" draw:text-style-name="P4" draw:layer="layout" svg:width="28cm" svg:height="3.257cm" svg:x="0cm" svg:y="0cm" presentation:class="title" presentation:user-transformed="true">
          <draw:text-box>
            <text:p text:style-name="P3"><text:span text:style-name="T6"><text:s/>O que é Contêiner</text:span></text:p>
          </draw:text-box>
        </draw:frame>
        <draw:frame draw:style-name="gr4" draw:text-style-name="P1" draw:layer="layout" svg:width="28cm" svg:height="12.493cm" svg:x="0cm" svg:y="3.257cm" presentation:class="graphic" presentation:user-transformed="true">
          <draw:image xlink:href="Pictures/1000000100000456000001C682BB0E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2" draw:text-style-name="P4" draw:layer="layout" svg:width="28cm" svg:height="3.257cm" svg:x="0cm" svg:y="0cm" presentation:class="title" presentation:user-transformed="true">
          <draw:text-box>
            <text:p text:style-name="P3"><text:span text:style-name="T6"><text:s/></text:span><text:span text:style-name="T1">O que é Imagem de Contêiner</text:span></text:p>
          </draw:text-box>
        </draw:frame>
        <draw:frame presentation:style-name="pr3" draw:text-style-name="P6" draw:layer="layout" svg:width="27cm" svg:height="12cm" svg:x="0.5cm" svg:y="3.5cm" presentation:class="outline" presentation:user-transformed="true">
          <draw:text-box>
            <text:list text:style-name="L2">
              <text:list-item>
                <text:p text:style-name="P5"><text:span text:style-name="T9">Uma </text:span><text:span text:style-name="T3">imagem de contêiner</text:span><text:span text:style-name="T9"> Docker é um pacote de software leve, </text:span><text:span text:style-name="T10">independente</text:span><text:span text:style-name="T9"> e </text:span><text:span text:style-name="T10">executável</text:span><text:span text:style-name="T9">, que i</text:span><text:span text:style-name="T10">nclui tudo o que é necessário para executar um aplicativo</text:span><text:span text:style-name="T9">: </text:span></text:p>
                <text:list>
                  <text:list-item>
                    <text:p text:style-name="P7"><text:span text:style-name="T11">Código; </text:span></text:p>
                  </text:list-item>
                  <text:list-item>
                    <text:p text:style-name="P7"><text:span text:style-name="T11">Ambiente de execução; </text:span></text:p>
                  </text:list-item>
                  <text:list-item>
                    <text:p text:style-name="P7"><text:span text:style-name="T11">Ferramentas de sistema; </text:span></text:p>
                  </text:list-item>
                  <text:list-item>
                    <text:p text:style-name="P7"><text:span text:style-name="T11">Bibliotecas de sistema e configurações.</text:span></text:p>
                  </text:list-item>
                </text:list>
              </text:list-item>
              <text:list-item>
                <text:p text:style-name="P5"><text:span text:style-name="T3">Imagens de contêiner</text:span><text:span text:style-name="T2"> podem ser encontradas no </text:span><text:span text:style-name="T12"><text:a xlink:href="https://hub.docker.com/" xlink:type="simple">Docker Hub</text:a></text:span><text:span text:style-name="T2">.</text:span></text:p>
              </text:list-item>
              <text:list-item>
                <text:p text:style-name="P5"><text:span text:style-name="T13">O </text:span><text:span text:style-name="T14"><text:a xlink:href="https://hub.docker.com/" xlink:type="simple">Docker Hub</text:a></text:span><text:span text:style-name="T2"><text:s/>é um </text:span><text:span text:style-name="T15">registro</text:span><text:span text:style-name="T16"> público de imagens, ou seja, uma localização central de armazenamento e compartilhamento de </text:span><text:span text:style-name="T17">imagens de contêiner</text:span><text:span text:style-name="T16">.</text:span></text:p>
              </text:list-item>
              <text:list-item>
                <text:p text:style-name="P5"><text:span text:style-name="T13">Registros podem também ser locais e privados e, quando públicos, não serem o <text:s text:c="2"/></text:span><text:span text:style-name="T14"><text:a xlink:href="https://hub.docker.com/" xlink:type="simple">Docker Hub</text:a></text:span><text:span text:style-name="T13">. Exemplos:</text:span></text:p>
                <text:list>
                  <text:list-item>
                    <text:p text:style-name="P5"><text:span text:style-name="T18"><text:a xlink:href="https://aws.amazon.com/ecr/" xlink:type="simple">Amazon Elastic Container Registry (ECR)</text:a></text:span><text:span text:style-name="T19">;</text:span></text:p>
                  </text:list-item>
                  <text:list-item>
                    <text:p text:style-name="P5"><text:span text:style-name="T18"><text:a xlink:href="https://azure.microsoft.com/en-in/products/container-registry" xlink:type="simple">Azure Container Registry (ACR)</text:a></text:span><text:span text:style-name="T19">;</text:span></text:p>
                  </text:list-item>
                  <text:list-item>
                    <text:p text:style-name="P5"><text:span text:style-name="T18"><text:a xlink:href="https://cloud.google.com/artifact-registry" xlink:type="simple">Google Container Registry (GCR)</text:a></text:span><text:span text:style-name="T19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2" draw:text-style-name="P4" draw:layer="layout" svg:width="28cm" svg:height="3.257cm" svg:x="0cm" svg:y="0cm" presentation:class="title" presentation:user-transformed="true">
          <draw:text-box>
            <text:p text:style-name="P3"><text:span text:style-name="T6"><text:s/></text:span><text:span text:style-name="T1">O que é Dockerfile</text:span></text:p>
          </draw:text-box>
        </draw:frame>
        <draw:frame presentation:style-name="pr3" draw:text-style-name="P6" draw:layer="layout" svg:width="27cm" svg:height="1.5cm" svg:x="0.5cm" svg:y="3.5cm" presentation:class="outline" presentation:user-transformed="true">
          <draw:text-box>
            <text:list text:style-name="L2">
              <text:list-item>
                <text:p text:style-name="P5"><text:span text:style-name="T9">Um </text:span><text:span text:style-name="T3">Dockerfile</text:span><text:span text:style-name="T9"> é um arquivo/documento que é usado para criar um contêiner a partir de uma imagem. Ex.:</text:span></text:p>
              </text:list-item>
            </text:list>
          </draw:text-box>
        </draw:frame>
        <draw:frame draw:style-name="gr5" draw:text-style-name="P8" draw:layer="layout" svg:width="15.225cm" svg:height="10cm" svg:x="0.5cm" svg:y="5.5cm">
          <draw:image xlink:href="Pictures/100000010000026100000190B031B874.png" xlink:type="simple" xlink:show="embed" xlink:actuate="onLoad" draw:mime-type="image/png">
            <text:p/>
          </draw:image>
        </draw:frame>
        <draw:frame presentation:style-name="pr3" draw:text-style-name="P6" draw:layer="layout" svg:width="11.5cm" svg:height="10cm" svg:x="16cm" svg:y="5.5cm" presentation:class="outline" presentation:user-transformed="true">
          <draw:text-box>
            <text:list text:style-name="L2">
              <text:list-item>
                <text:p text:style-name="P5"><text:span text:style-name="T12"><text:a xlink:href="https://docs.docker.com/get-started/docker-concepts/building-images/writing-a-dockerfile/" xlink:type="simple">Fonte</text:a></text:span><text:span text:style-name="T9"><text:s/>da imagem ao lado.</text:span></text:p>
              </text:list-item>
              <text:list-item>
                <text:p text:style-name="P5"><text:span text:style-name="T12"><text:a xlink:href="https://docs.docker.com/reference/dockerfile/" xlink:type="simple">Referência Dockerfile</text:a></text:span><text:span text:style-name="T20">.</text:span></text:p>
              </text:list-item>
              <text:list-item>
                <text:p text:style-name="P5"><text:span text:style-name="T12"><text:a xlink:href="https://docs.docker.com/get-started/docker-concepts/building-images/writing-a-dockerfile/" xlink:type="simple">Dockerfile best practices</text:a></text:span><text:span text:style-name="T20">.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2" draw:text-style-name="P4" draw:layer="layout" svg:width="28cm" svg:height="3.257cm" svg:x="0cm" svg:y="0cm" presentation:class="title" presentation:user-transformed="true">
          <draw:text-box>
            <text:p text:style-name="P3"><text:span text:style-name="T6"><text:s/></text:span><text:span text:style-name="T1">O que é Docker Compose</text:span></text:p>
          </draw:text-box>
        </draw:frame>
        <draw:frame presentation:style-name="pr3" draw:text-style-name="P6" draw:layer="layout" svg:width="27cm" svg:height="12cm" svg:x="0.5cm" svg:y="3.5cm" presentation:class="outline" presentation:user-transformed="true">
          <draw:text-box>
            <text:list text:style-name="L2">
              <text:list-item>
                <text:p text:style-name="P5"><text:span text:style-name="T9">Projetos maiores e mais complexos possuem mais componentes.</text:span></text:p>
              </text:list-item>
              <text:list-item>
                <text:p text:style-name="P5"><text:span text:style-name="T9">Todos esses componentes podem estar inclusos em um único contêiner.</text:span></text:p>
              </text:list-item>
              <text:list-item>
                <text:p text:style-name="P5"><text:span text:style-name="T9">Entretanto, essa não é uma boa prática. Além de deixar o projeto como um todo mais complexo, podemos ter como consequência vulnerabilidades de segurança e também de </text:span><text:span text:style-name="T21">runtime</text:span><text:span text:style-name="T22">.</text:span></text:p>
              </text:list-item>
              <text:list-item>
                <text:p text:style-name="P5"><text:span text:style-name="T22">Solução: </text:span><text:span text:style-name="T23">Docker Compose</text:span><text:span text:style-name="T22">:</text:span></text:p>
                <text:list>
                  <text:list-item>
                    <text:p text:style-name="P7"><text:span text:style-name="T24">Arquivo YAML contendo todos os contêineres e suas configuraçõ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2" draw:text-style-name="P4" draw:layer="layout" svg:width="28cm" svg:height="3.257cm" svg:x="0cm" svg:y="0cm" presentation:class="title" presentation:user-transformed="true">
          <draw:text-box>
            <text:p text:style-name="P3"><text:span text:style-name="T6"><text:s/></text:span><text:span text:style-name="T1">O que é Docker Compose</text:span></text:p>
          </draw:text-box>
        </draw:frame>
        <draw:frame draw:style-name="gr5" draw:text-style-name="P8" draw:layer="layout" svg:width="11.84cm" svg:height="11.881cm" svg:x="8.16cm" svg:y="3.5cm">
          <draw:image xlink:href="Pictures/100000010000023A0000023C61C143B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_20_de_20_seta_20_1" draw:display-name="Ponta de seta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7T15:53:10.059202550</meta:creation-date>
    <dc:date>2026-06-09T10:15:17.836286011</dc:date>
    <meta:editing-duration>PT35M43S</meta:editing-duration>
    <meta:editing-cycles>3</meta:editing-cycles>
    <meta:generator>LibreOffice/26.2.3.2$Linux_X86_64 LibreOffice_project/620$Build-2</meta:generator>
    <meta:document-statistic meta:object-count="56"/>
  </office:meta>
</office:document-meta>
</file>